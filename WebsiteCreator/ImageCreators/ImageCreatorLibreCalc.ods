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svg:stroke-width="0.02cm" svg:stroke-color="#000000" draw:marker-start-width="0.23cm" draw:marker-end-width="0.23cm" draw:textarea-horizontal-align="center" draw:textarea-vertical-align="middle" fo:padding-top="0.01cm" fo:padding-bottom="0.01cm" fo:padding-left="0.01cm" fo:padding-right="0.01cm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ear_12_Adv" table:style-name="ta1">
        <table:shapes>
          <draw:line draw:z-index="0" draw:name="Line 1" draw:style-name="gr1" draw:text-style-name="P1" svg:x1="4.103cm" svg:y1="3.88cm" svg:x2="4.79cm" svg:y2="3.793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A-S2 Descriptive statistics and bivariate data analysi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ally </text:p>
          </table:table-cell>
          <table:table-cell table:style-name="ce1" office:value-type="string" calcext:value-type="string">
            <text:p>Frequency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I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IIII II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I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IIII IIII</text:p>
            <draw:line draw:z-index="1" draw:name="Line 2" draw:style-name="gr1" draw:text-style-name="P1" svg:x1="0.569cm" svg:y1="0.293cm" svg:x2="1.256cm" svg:y2="0.206cm">
              <text:p/>
            </draw:line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I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hf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Free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Adwaita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FreeSans" style:font-family-asian="FreeSans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9:57:25.061132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20:05:00.174785842</meta:creation-date>
    <dc:date>2025-11-02T20:07:00.793573281</dc:date>
    <meta:editing-duration>PT1H45M11S</meta:editing-duration>
    <meta:editing-cycles>4</meta:editing-cycles>
    <meta:generator>LibreOffice/25.8.2.2$Linux_X86_64 LibreOffice_project/580$Build-2</meta:generator>
    <meta:document-statistic meta:table-count="1" meta:cell-count="23" meta:object-count="2"/>
  </office:meta>
</office:document-meta>
</file>